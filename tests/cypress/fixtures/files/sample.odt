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88" officeooo:paragraph-rsid="0016f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1:31:02.808968207</meta:creation-date>
    <dc:date>2026-06-05T11:31:41.283632044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